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b3b3b3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7cm" svg:x="0.385cm" svg:y="0.529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5cm" svg:height="6cm" svg:x="8.885cm" svg:y="1.029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5.5cm" svg:height="3.5cm" svg:x="1.385cm" svg:y="1.529cm">
          <text:p text:style-name="P2"><text:span text:style-name="T2">JavaScrip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28cm" svg:height="1cm" svg:x="2.171cm" svg:y="2.529cm">
          <text:p text:style-name="P3"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28cm" svg:height="1cm" svg:x="2.171cm" svg:y="3.529cm">
          <text:p text:style-name="P3"><text:span text:style-name="T3">Event Handler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cm" svg:height="2cm" svg:x="1.385cm" svg:y="5.029cm">
          <text:p text:style-name="P3"><text:span text:style-name="T2">HTML</text:span><text:span text:style-name="T3"> GUI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4" draw:layer="layout" svg:width="2.89cm" svg:height="2.5cm" svg:x="16.495cm" svg:y="3.029cm">
          <text:p text:style-name="P3"><text:span text:style-name="T3">channel.xm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3" draw:id="id2" draw:layer="layout" svg:width="5.5cm" svg:height="2cm" svg:x="9.885cm" svg:y="2.029cm">
          <text:p text:style-name="P3"><text:span text:style-name="T3">update.ph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draw:id="id3" draw:layer="layout" svg:width="5.5cm" svg:height="2cm" svg:x="9.885cm" svg:y="4.529cm">
          <text:p text:style-name="P3"><text:span text:style-name="T3">publish.ph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4" draw:layer="layout" svg:x1="6.885cm" svg:y1="3.279cm" svg:x2="9.885cm" svg:y2="3.028cm" draw:start-shape="id1" draw:start-glue-point="1" draw:end-shape="id2" draw:end-glue-point="5" svg:d="m6885 3279h1500v-251h1500">
          <text:p/>
        </draw:connector>
        <draw:connector draw:style-name="gr5" draw:text-style-name="P4" draw:layer="layout" svg:x1="6.885cm" svg:y1="3.279cm" svg:x2="9.885cm" svg:y2="5.528cm" draw:start-shape="id1" draw:start-glue-point="1" draw:end-shape="id3" draw:end-glue-point="5" svg:d="m6885 3279h1500v2249h1500">
          <text:p/>
        </draw:connector>
        <draw:connector draw:style-name="gr5" draw:text-style-name="P4" draw:layer="layout" svg:x1="15.385cm" svg:y1="3.028cm" svg:x2="16.495cm" svg:y2="4.278cm" draw:start-shape="id2" draw:start-glue-point="7" draw:end-shape="id4" draw:end-glue-point="6" svg:d="m15385 3028h556v1250h554">
          <text:p/>
        </draw:connector>
        <draw:connector draw:style-name="gr5" draw:text-style-name="P4" draw:layer="layout" svg:x1="15.385cm" svg:y1="5.528cm" svg:x2="16.495cm" svg:y2="4.278cm" draw:start-shape="id3" draw:start-glue-point="7" draw:end-shape="id4" draw:end-glue-point="6" svg:d="m15385 5528h556v-1250h5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29cm" fo:margin-bottom="0.559cm" fo:margin-left="0.385cm" fo:margin-right="0.42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5T16:05:22</meta:creation-date>
    <dc:date>2010-01-05T16:19:05</dc:date>
    <meta:editing-duration>PT00H13M47S</meta:editing-duration>
    <meta:editing-cycles>1</meta:editing-cycles>
    <meta:document-statistic meta:object-count="13"/>
    <meta:generator>OpenOffice.org/3.1$Unix OpenOffice.org_project/310m19$Build-9420</meta:generator>
  </office:meta>
</office:document-meta>
</file>