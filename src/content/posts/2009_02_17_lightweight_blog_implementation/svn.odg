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bottom" draw:shadow="visible"/>
    </style:style>
    <style:style style:name="gr3" style:family="graphic" style:parent-style-name="standard">
      <style:graphic-properties draw:fill="solid" draw:fill-color="#e6e6ff" draw:textarea-horizontal-align="center" draw:textarea-vertical-align="bottom" draw:shadow="visible" draw:shadow-offset-x="0.051cm" draw:shadow-offset-y="0.05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43cm" svg:height="16.087cm" svg:x="3.963cm" svg:y="10.313cm">
          <text:p/>
        </draw:rect>
        <draw:rect draw:style-name="gr2" draw:text-style-name="P1" draw:layer="layout" svg:width="10.16cm" svg:height="5.927cm" svg:x="4.386cm" svg:y="10.736cm">
          <text:p text:style-name="P1">Web Server</text:p>
        </draw:rect>
        <draw:rect draw:style-name="gr3" draw:text-style-name="P1" draw:layer="layout" svg:width="9.313cm" svg:height="4.657cm" svg:x="4.81cm" svg:y="11.159cm">
          <text:p text:style-name="P1">Apache</text:p>
        </draw:rect>
        <draw:custom-shape draw:style-name="gr4" draw:text-style-name="P1" draw:layer="layout" svg:width="2.54cm" svg:height="2.117cm" svg:x="5.233cm" svg:y="11.583cm">
          <text:p text:style-name="P1">SV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2.54cm" svg:height="0.847cm" svg:x="5.233cm" svg:y="14.123cm">
          <text:p text:style-name="P1">WebDAV</text:p>
        </draw:rect>
        <draw:rect draw:style-name="gr5" draw:text-style-name="P1" draw:layer="layout" svg:width="2.54cm" svg:height="0.847cm" svg:x="11.159cm" svg:y="14.123cm">
          <text:p text:style-name="P1">HTTP</text:p>
        </draw:rect>
        <draw:custom-shape draw:style-name="gr4" draw:text-style-name="P1" draw:layer="layout" svg:width="2.54cm" svg:height="2.117cm" svg:x="11.159cm" svg:y="11.583cm">
          <text:p text:style-name="P1">Working</text:p>
          <text:p text:style-name="P1">Cop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7.773cm" svg:y1="12.853cm" svg:x2="11.16cm" svg:y2="12.853cm">
          <text:p text:style-name="P1">SVN update</text:p>
          <text:p text:style-name="P1"/>
        </draw:line>
        <draw:rect draw:style-name="gr2" draw:text-style-name="P1" draw:layer="layout" svg:width="10.16cm" svg:height="5.927cm" svg:x="4.386cm" svg:y="19.626cm">
          <text:p text:style-name="P1">Local Workstation</text:p>
        </draw:rect>
        <draw:rect draw:style-name="gr3" draw:text-style-name="P1" draw:layer="layout" svg:width="3.386cm" svg:height="4.656cm" svg:x="4.81cm" svg:y="20.05cm">
          <text:p text:style-name="P1">Apache</text:p>
        </draw:rect>
        <draw:custom-shape draw:style-name="gr4" draw:text-style-name="P1" draw:layer="layout" svg:width="2.54cm" svg:height="2.117cm" svg:x="5.233cm" svg:y="20.473cm">
          <text:p text:style-name="P1">Working</text:p>
          <text:p text:style-name="P1">Cop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2.54cm" svg:height="0.847cm" svg:x="5.233cm" svg:y="23.013cm">
          <text:p text:style-name="P1">HTTP</text:p>
        </draw:rect>
        <draw:rect draw:style-name="gr3" draw:text-style-name="P1" draw:layer="layout" svg:width="5.503cm" svg:height="4.656cm" svg:x="8.62cm" svg:y="20.05cm">
          <text:p text:style-name="P1">Development Tools</text:p>
        </draw:rect>
        <draw:rect draw:style-name="gr5" draw:text-style-name="P1" draw:layer="layout" svg:width="4.657cm" svg:height="0.847cm" svg:x="9.043cm" svg:y="21.319cm">
          <text:p text:style-name="P1">Gimp</text:p>
        </draw:rect>
        <draw:rect draw:style-name="gr5" draw:text-style-name="P1" draw:layer="layout" svg:width="4.657cm" svg:height="0.846cm" svg:x="9.043cm" svg:y="23.014cm">
          <text:p text:style-name="P1">gedit</text:p>
        </draw:rect>
        <draw:rect draw:style-name="gr5" draw:text-style-name="P1" draw:layer="layout" svg:width="4.657cm" svg:height="0.846cm" svg:x="9.043cm" svg:y="22.166cm">
          <text:p text:style-name="P1">Inkscape</text:p>
        </draw:rect>
        <draw:rect draw:style-name="gr5" draw:text-style-name="P1" draw:layer="layout" svg:width="4.657cm" svg:height="0.847cm" svg:x="9.043cm" svg:y="20.473cm">
          <text:p text:style-name="P1">OpenOffice.org</text:p>
        </draw:rect>
        <draw:line draw:style-name="gr7" draw:text-style-name="P1" draw:layer="layout" svg:x1="6.503cm" svg:y1="20.896cm" svg:x2="6.503cm" svg:y2="14.97cm">
          <text:p text:style-name="P1">SVN commit <text:s text:c="5"/>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rg Hackenberg</meta:initial-creator>
    <meta:creation-date>2009-02-17T00:13:10</meta:creation-date>
    <dc:date>2009-02-17T01:15:46</dc:date>
    <dc:creator>Georg Hackenberg</dc:creator>
    <meta:editing-duration>PT00H01M01S</meta:editing-duration>
    <meta:editing-cycles>1</meta:editing-cycles>
    <meta:document-statistic meta:object-count="18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